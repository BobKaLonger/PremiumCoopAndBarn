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Light" svg:font-family="'Roboto Light'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1937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5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1"/>
        <table:table-column table:style-name="co5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1"/>
        <table:table-column table:style-name="co5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21"/>
        <table:table-row table:style-name="ro1">
          <table:table-cell table:style-name="ce3" office:value-type="string" calcext:value-type="string" table:number-columns-spanned="4" table:number-rows-spanned="1">
            <text:p>Day Tiles</text:p>
          </table:table-cell>
          <table:covered-table-cell table:number-columns-repeated="3" table:style-name="ce3"/>
          <table:table-cell table:style-name="ce17"/>
          <table:table-cell table:style-name="ce2"/>
          <table:table-cell table:style-name="ce3" office:value-type="string" calcext:value-type="string" table:number-columns-spanned="4" table:number-rows-spanned="1">
            <text:p>Night Tiles</text:p>
          </table:table-cell>
          <table:covered-table-cell table:number-columns-repeated="3" table:style-name="ce3"/>
          <table:table-cell table:style-name="ce17"/>
          <table:table-cell table:style-name="ce2"/>
          <table:table-cell table:style-name="ce3" office:value-type="string" calcext:value-type="string" table:number-columns-spanned="3" table:number-rows-spanned="1">
            <text:p>Lights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2]&amp;&quot; &quot;&amp;[.B2]&amp;&quot; &quot;&amp;[.C2]&amp;&quot; &quot;&amp;[.D2]" office:value-type="string" office:string-value="Buildings 6 1 24" calcext:value-type="string">
            <text:p>Buildings 6 1 24</text:p>
          </table:table-cell>
          <table:table-cell table:style-name="ce2"/>
          <table:table-cell table:style-name="ce4" table:formula="of:=[.A2]" office:value-type="string" office:string-value="Buildings" calcext:value-type="string">
            <text:p>Buildings</text:p>
          </table:table-cell>
          <table:table-cell table:style-name="ce1" table:formula="of:=[.B2]" office:value-type="float" office:value="6" calcext:value-type="float">
            <text:p>6</text:p>
          </table:table-cell>
          <table:table-cell table:style-name="ce1" table:formula="of:=[.C2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2]&amp;&quot; &quot;&amp;[.H2]&amp;&quot; &quot;&amp;[.I2]&amp;&quot; &quot;&amp;[.J2]" office:value-type="string" office:string-value="Buildings 6 1 26" calcext:value-type="string">
            <text:p>Buildings 6 1 26</text:p>
          </table:table-cell>
          <table:table-cell table:style-name="ce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2]&amp;&quot; &quot;&amp;[.N2]&amp;&quot; &quot;&amp;[.O2]" office:value-type="string" office:string-value="3 5 4" calcext:value-type="string">
            <text:p>3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3]&amp;&quot; &quot;&amp;[.B3]&amp;&quot; &quot;&amp;[.C3]&amp;&quot; &quot;&amp;[.D3]" office:value-type="string" office:string-value="Buildings 7 1 24" calcext:value-type="string">
            <text:p>Buildings 7 1 24</text:p>
          </table:table-cell>
          <table:table-cell table:style-name="ce2"/>
          <table:table-cell table:style-name="ce4" table:formula="of:=[.A3]" office:value-type="string" office:string-value="Buildings" calcext:value-type="string">
            <text:p>Buildings</text:p>
          </table:table-cell>
          <table:table-cell table:style-name="ce1" table:formula="of:=[.B3]" office:value-type="float" office:value="7" calcext:value-type="float">
            <text:p>7</text:p>
          </table:table-cell>
          <table:table-cell table:style-name="ce1" table:formula="of:=[.C3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3]&amp;&quot; &quot;&amp;[.H3]&amp;&quot; &quot;&amp;[.I3]&amp;&quot; &quot;&amp;[.J3]" office:value-type="string" office:string-value="Buildings 7 1 26" calcext:value-type="string">
            <text:p>Buildings 7 1 26</text:p>
          </table:table-cell>
          <table:table-cell table:style-name="ce2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3]&amp;&quot; &quot;&amp;[.N3]&amp;&quot; &quot;&amp;[.O3]" office:value-type="string" office:string-value="6 5 4" calcext:value-type="string">
            <text:p>6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4]&amp;&quot; &quot;&amp;[.B4]&amp;&quot; &quot;&amp;[.C4]&amp;&quot; &quot;&amp;[.D4]" office:value-type="string" office:string-value="Buildings 10 1 24" calcext:value-type="string">
            <text:p>Buildings 10 1 24</text:p>
          </table:table-cell>
          <table:table-cell table:style-name="ce2"/>
          <table:table-cell table:style-name="ce4" table:formula="of:=[.A4]" office:value-type="string" office:string-value="Buildings" calcext:value-type="string">
            <text:p>Buildings</text:p>
          </table:table-cell>
          <table:table-cell table:style-name="ce1" table:formula="of:=[.B4]" office:value-type="float" office:value="10" calcext:value-type="float">
            <text:p>10</text:p>
          </table:table-cell>
          <table:table-cell table:style-name="ce1" table:formula="of:=[.C4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4]&amp;&quot; &quot;&amp;[.H4]&amp;&quot; &quot;&amp;[.I4]&amp;&quot; &quot;&amp;[.J4]" office:value-type="string" office:string-value="Buildings 10 1 26" calcext:value-type="string">
            <text:p>Buildings 10 1 26</text:p>
          </table:table-cell>
          <table:table-cell table:style-name="ce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4]&amp;&quot; &quot;&amp;[.N4]&amp;&quot; &quot;&amp;[.O4]" office:value-type="string" office:string-value="7 5 4" calcext:value-type="string">
            <text:p>7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5]&amp;&quot; &quot;&amp;[.B5]&amp;&quot; &quot;&amp;[.C5]&amp;&quot; &quot;&amp;[.D5]" office:value-type="string" office:string-value="Buildings 11 1 24" calcext:value-type="string">
            <text:p>Buildings 11 1 24</text:p>
          </table:table-cell>
          <table:table-cell table:style-name="ce2"/>
          <table:table-cell table:style-name="ce4" table:formula="of:=[.A5]" office:value-type="string" office:string-value="Buildings" calcext:value-type="string">
            <text:p>Buildings</text:p>
          </table:table-cell>
          <table:table-cell table:style-name="ce1" table:formula="of:=[.B5]" office:value-type="float" office:value="11" calcext:value-type="float">
            <text:p>11</text:p>
          </table:table-cell>
          <table:table-cell table:style-name="ce1" table:formula="of:=[.C5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5]&amp;&quot; &quot;&amp;[.H5]&amp;&quot; &quot;&amp;[.I5]&amp;&quot; &quot;&amp;[.J5]" office:value-type="string" office:string-value="Buildings 11 1 26" calcext:value-type="string">
            <text:p>Buildings 11 1 26</text:p>
          </table:table-cell>
          <table:table-cell table:style-name="ce2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5]&amp;&quot; &quot;&amp;[.N5]&amp;&quot; &quot;&amp;[.O5]" office:value-type="string" office:string-value="10 5 4" calcext:value-type="string">
            <text:p>10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6]&amp;&quot; &quot;&amp;[.B6]&amp;&quot; &quot;&amp;[.C6]&amp;&quot; &quot;&amp;[.D6]" office:value-type="string" office:string-value="Buildings 14 1 24" calcext:value-type="string">
            <text:p>Buildings 14 1 24</text:p>
          </table:table-cell>
          <table:table-cell table:style-name="ce2"/>
          <table:table-cell table:style-name="ce4" table:formula="of:=[.A6]" office:value-type="string" office:string-value="Buildings" calcext:value-type="string">
            <text:p>Buildings</text:p>
          </table:table-cell>
          <table:table-cell table:style-name="ce1" table:formula="of:=[.B6]" office:value-type="float" office:value="14" calcext:value-type="float">
            <text:p>14</text:p>
          </table:table-cell>
          <table:table-cell table:style-name="ce1" table:formula="of:=[.C6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6]&amp;&quot; &quot;&amp;[.H6]&amp;&quot; &quot;&amp;[.I6]&amp;&quot; &quot;&amp;[.J6]" office:value-type="string" office:string-value="Buildings 14 1 26" calcext:value-type="string">
            <text:p>Buildings 14 1 26</text:p>
          </table:table-cell>
          <table:table-cell table:style-name="ce2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6]&amp;&quot; &quot;&amp;[.N6]&amp;&quot; &quot;&amp;[.O6]" office:value-type="string" office:string-value="11 5 4" calcext:value-type="string">
            <text:p>11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7]&amp;&quot; &quot;&amp;[.B7]&amp;&quot; &quot;&amp;[.C7]&amp;&quot; &quot;&amp;[.D7]" office:value-type="string" office:string-value="Buildings 15 1 24" calcext:value-type="string">
            <text:p>Buildings 15 1 24</text:p>
          </table:table-cell>
          <table:table-cell table:style-name="ce2"/>
          <table:table-cell table:style-name="ce4" table:formula="of:=[.A7]" office:value-type="string" office:string-value="Buildings" calcext:value-type="string">
            <text:p>Buildings</text:p>
          </table:table-cell>
          <table:table-cell table:style-name="ce1" table:formula="of:=[.B7]" office:value-type="float" office:value="15" calcext:value-type="float">
            <text:p>15</text:p>
          </table:table-cell>
          <table:table-cell table:style-name="ce1" table:formula="of:=[.C7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7]&amp;&quot; &quot;&amp;[.H7]&amp;&quot; &quot;&amp;[.I7]&amp;&quot; &quot;&amp;[.J7]" office:value-type="string" office:string-value="Buildings 15 1 26" calcext:value-type="string">
            <text:p>Buildings 15 1 26</text:p>
          </table:table-cell>
          <table:table-cell table:style-name="ce2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7]&amp;&quot; &quot;&amp;[.N7]&amp;&quot; &quot;&amp;[.O7]" office:value-type="string" office:string-value="14 5 4" calcext:value-type="string">
            <text:p>14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8]&amp;&quot; &quot;&amp;[.B8]&amp;&quot; &quot;&amp;[.C8]&amp;&quot; &quot;&amp;[.D8]" office:value-type="string" office:string-value="Buildings 18 1 24" calcext:value-type="string">
            <text:p>Buildings 18 1 24</text:p>
          </table:table-cell>
          <table:table-cell table:style-name="ce2"/>
          <table:table-cell table:style-name="ce4" table:formula="of:=[.A8]" office:value-type="string" office:string-value="Buildings" calcext:value-type="string">
            <text:p>Buildings</text:p>
          </table:table-cell>
          <table:table-cell table:style-name="ce1" table:formula="of:=[.B8]" office:value-type="float" office:value="18" calcext:value-type="float">
            <text:p>18</text:p>
          </table:table-cell>
          <table:table-cell table:style-name="ce1" table:formula="of:=[.C8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8]&amp;&quot; &quot;&amp;[.H8]&amp;&quot; &quot;&amp;[.I8]&amp;&quot; &quot;&amp;[.J8]" office:value-type="string" office:string-value="Buildings 18 1 26" calcext:value-type="string">
            <text:p>Buildings 18 1 26</text:p>
          </table:table-cell>
          <table:table-cell table:style-name="ce2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8]&amp;&quot; &quot;&amp;[.N8]&amp;&quot; &quot;&amp;[.O8]" office:value-type="string" office:string-value="15 5 4" calcext:value-type="string">
            <text:p>15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9]&amp;&quot; &quot;&amp;[.B9]&amp;&quot; &quot;&amp;[.C9]&amp;&quot; &quot;&amp;[.D9]" office:value-type="string" office:string-value="Buildings 19 1 24" calcext:value-type="string">
            <text:p>Buildings 19 1 24</text:p>
          </table:table-cell>
          <table:table-cell table:style-name="ce2"/>
          <table:table-cell table:style-name="ce4" table:formula="of:=[.A9]" office:value-type="string" office:string-value="Buildings" calcext:value-type="string">
            <text:p>Buildings</text:p>
          </table:table-cell>
          <table:table-cell table:style-name="ce1" table:formula="of:=[.B9]" office:value-type="float" office:value="19" calcext:value-type="float">
            <text:p>19</text:p>
          </table:table-cell>
          <table:table-cell table:style-name="ce1" table:formula="of:=[.C9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9]&amp;&quot; &quot;&amp;[.H9]&amp;&quot; &quot;&amp;[.I9]&amp;&quot; &quot;&amp;[.J9]" office:value-type="string" office:string-value="Buildings 19 1 26" calcext:value-type="string">
            <text:p>Buildings 19 1 26</text:p>
          </table:table-cell>
          <table:table-cell table:style-name="ce2"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9]&amp;&quot; &quot;&amp;[.N9]&amp;&quot; &quot;&amp;[.O9]" office:value-type="string" office:string-value="18 5 4" calcext:value-type="string">
            <text:p>18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10]&amp;&quot; &quot;&amp;[.B10]&amp;&quot; &quot;&amp;[.C10]&amp;&quot; &quot;&amp;[.D10]" office:value-type="string" office:string-value="Buildings 22 1 24" calcext:value-type="string">
            <text:p>Buildings 22 1 24</text:p>
          </table:table-cell>
          <table:table-cell table:style-name="ce2"/>
          <table:table-cell table:style-name="ce4" table:formula="of:=[.A10]" office:value-type="string" office:string-value="Buildings" calcext:value-type="string">
            <text:p>Buildings</text:p>
          </table:table-cell>
          <table:table-cell table:style-name="ce1" table:formula="of:=[.B10]" office:value-type="float" office:value="22" calcext:value-type="float">
            <text:p>22</text:p>
          </table:table-cell>
          <table:table-cell table:style-name="ce1" table:formula="of:=[.C10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10]&amp;&quot; &quot;&amp;[.H10]&amp;&quot; &quot;&amp;[.I10]&amp;&quot; &quot;&amp;[.J10]" office:value-type="string" office:string-value="Buildings 22 1 26" calcext:value-type="string">
            <text:p>Buildings 22 1 26</text:p>
          </table:table-cell>
          <table:table-cell table:style-name="ce2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10]&amp;&quot; &quot;&amp;[.N10]&amp;&quot; &quot;&amp;[.O10]" office:value-type="string" office:string-value="19 5 4" calcext:value-type="string">
            <text:p>19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11]&amp;&quot; &quot;&amp;[.B11]&amp;&quot; &quot;&amp;[.C11]&amp;&quot; &quot;&amp;[.D11]" office:value-type="string" office:string-value="Buildings 23 1 24" calcext:value-type="string">
            <text:p>Buildings 23 1 24</text:p>
          </table:table-cell>
          <table:table-cell table:style-name="ce2"/>
          <table:table-cell table:style-name="ce4" table:formula="of:=[.A11]" office:value-type="string" office:string-value="Buildings" calcext:value-type="string">
            <text:p>Buildings</text:p>
          </table:table-cell>
          <table:table-cell table:style-name="ce1" table:formula="of:=[.B11]" office:value-type="float" office:value="23" calcext:value-type="float">
            <text:p>23</text:p>
          </table:table-cell>
          <table:table-cell table:style-name="ce1" table:formula="of:=[.C11]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11]&amp;&quot; &quot;&amp;[.H11]&amp;&quot; &quot;&amp;[.I11]&amp;&quot; &quot;&amp;[.J11]" office:value-type="string" office:string-value="Buildings 23 1 26" calcext:value-type="string">
            <text:p>Buildings 23 1 26</text:p>
          </table:table-cell>
          <table:table-cell table:style-name="ce2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11]&amp;&quot; &quot;&amp;[.N11]&amp;&quot; &quot;&amp;[.O11]" office:value-type="string" office:string-value="22 5 4" calcext:value-type="string">
            <text:p>22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12]&amp;&quot; &quot;&amp;[.B12]&amp;&quot; &quot;&amp;[.C12]&amp;&quot; &quot;&amp;[.D12]" office:value-type="string" office:string-value="Buildings 26 4 24" calcext:value-type="string">
            <text:p>Buildings 26 4 24</text:p>
          </table:table-cell>
          <table:table-cell table:style-name="ce2"/>
          <table:table-cell table:style-name="ce4" table:formula="of:=[.A12]" office:value-type="string" office:string-value="Buildings" calcext:value-type="string">
            <text:p>Buildings</text:p>
          </table:table-cell>
          <table:table-cell table:style-name="ce1" table:formula="of:=[.B12]" office:value-type="float" office:value="26" calcext:value-type="float">
            <text:p>26</text:p>
          </table:table-cell>
          <table:table-cell table:style-name="ce1" table:formula="of:=[.C12]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12]&amp;&quot; &quot;&amp;[.H12]&amp;&quot; &quot;&amp;[.I12]&amp;&quot; &quot;&amp;[.J12]" office:value-type="string" office:string-value="Buildings 26 4 26" calcext:value-type="string">
            <text:p>Buildings 26 4 26</text:p>
          </table:table-cell>
          <table:table-cell table:style-name="ce2"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formula="of:=[.M12]&amp;&quot; &quot;&amp;[.N12]&amp;&quot; &quot;&amp;[.O12]" office:value-type="string" office:string-value="23 5 4" calcext:value-type="string">
            <text:p>23 5 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formula="of:=[.A13]&amp;&quot; &quot;&amp;[.B13]&amp;&quot; &quot;&amp;[.C13]&amp;&quot; &quot;&amp;[.D13]" office:value-type="string" office:string-value="Buildings 27 4 24" calcext:value-type="string">
            <text:p>Buildings 27 4 24</text:p>
          </table:table-cell>
          <table:table-cell table:style-name="ce2"/>
          <table:table-cell table:style-name="ce4" table:formula="of:=[.A13]" office:value-type="string" office:string-value="Buildings" calcext:value-type="string">
            <text:p>Buildings</text:p>
          </table:table-cell>
          <table:table-cell table:style-name="ce1" table:formula="of:=[.B13]" office:value-type="float" office:value="27" calcext:value-type="float">
            <text:p>27</text:p>
          </table:table-cell>
          <table:table-cell table:style-name="ce1" table:formula="of:=[.C13]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7" table:formula="of:=[.G13]&amp;&quot; &quot;&amp;[.H13]&amp;&quot; &quot;&amp;[.I13]&amp;&quot; &quot;&amp;[.J13]" office:value-type="string" office:string-value="Buildings 27 4 26" calcext:value-type="string">
            <text:p>Buildings 27 4 26</text:p>
          </table:table-cell>
          <table:table-cell table:style-name="ce2"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formula="of:=[.M13]&amp;&quot; &quot;&amp;[.N13]&amp;&quot; &quot;&amp;[.O13]" office:value-type="string" office:string-value="26 8 4" calcext:value-type="string">
            <text:p>26 8 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14]&amp;&quot; &quot;&amp;[.B14]&amp;&quot; &quot;&amp;[.C14]&amp;&quot; &quot;&amp;[.D14]" office:value-type="string" office:string-value="Back 6 5 25" calcext:value-type="string">
            <text:p>Back 6 5 25</text:p>
          </table:table-cell>
          <table:table-cell table:style-name="ce2"/>
          <table:table-cell table:style-name="ce4" table:formula="of:=[.A14]" office:value-type="string" office:string-value="Back" calcext:value-type="string">
            <text:p>Back</text:p>
          </table:table-cell>
          <table:table-cell table:style-name="ce1" table:formula="of:=[.B14]" office:value-type="float" office:value="6" calcext:value-type="float">
            <text:p>6</text:p>
          </table:table-cell>
          <table:table-cell table:style-name="ce1" table:formula="of:=[.C14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14]&amp;&quot; &quot;&amp;[.H14]&amp;&quot; &quot;&amp;[.I14]&amp;&quot; &quot;&amp;[.J14]" office:value-type="string" office:string-value="Back 6 5 12" calcext:value-type="string">
            <text:p>Back 6 5 12</text:p>
          </table:table-cell>
          <table:table-cell table:style-name="ce2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formula="of:=[.M14]&amp;&quot; &quot;&amp;[.N14]&amp;&quot; &quot;&amp;[.O14]" office:value-type="string" office:string-value="27 8 4" calcext:value-type="string">
            <text:p>27 8 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15]&amp;&quot; &quot;&amp;[.B15]&amp;&quot; &quot;&amp;[.C15]&amp;&quot; &quot;&amp;[.D15]" office:value-type="string" office:string-value="Back 7 5 25" calcext:value-type="string">
            <text:p>Back 7 5 25</text:p>
          </table:table-cell>
          <table:table-cell table:style-name="ce2"/>
          <table:table-cell table:style-name="ce4" table:formula="of:=[.A15]" office:value-type="string" office:string-value="Back" calcext:value-type="string">
            <text:p>Back</text:p>
          </table:table-cell>
          <table:table-cell table:style-name="ce1" table:formula="of:=[.B15]" office:value-type="float" office:value="7" calcext:value-type="float">
            <text:p>7</text:p>
          </table:table-cell>
          <table:table-cell table:style-name="ce1" table:formula="of:=[.C15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15]&amp;&quot; &quot;&amp;[.H15]&amp;&quot; &quot;&amp;[.I15]&amp;&quot; &quot;&amp;[.J15]" office:value-type="string" office:string-value="Back 7 5 12" calcext:value-type="string">
            <text:p>Back 7 5 12</text:p>
          </table:table-cell>
          <table:table-cell table:style-name="ce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formula="of:=[.M15]&amp;&quot; &quot;&amp;[.N15]&amp;&quot; &quot;&amp;[.O15]" office:value-type="string" office:string-value="5 9 4" calcext:value-type="string">
            <text:p>5 9 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16]&amp;&quot; &quot;&amp;[.B16]&amp;&quot; &quot;&amp;[.C16]&amp;&quot; &quot;&amp;[.D16]" office:value-type="string" office:string-value="Back 10 5 25" calcext:value-type="string">
            <text:p>Back 10 5 25</text:p>
          </table:table-cell>
          <table:table-cell table:style-name="ce2"/>
          <table:table-cell table:style-name="ce4" table:formula="of:=[.A16]" office:value-type="string" office:string-value="Back" calcext:value-type="string">
            <text:p>Back</text:p>
          </table:table-cell>
          <table:table-cell table:style-name="ce1" table:formula="of:=[.B16]" office:value-type="float" office:value="10" calcext:value-type="float">
            <text:p>10</text:p>
          </table:table-cell>
          <table:table-cell table:style-name="ce1" table:formula="of:=[.C16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16]&amp;&quot; &quot;&amp;[.H16]&amp;&quot; &quot;&amp;[.I16]&amp;&quot; &quot;&amp;[.J16]" office:value-type="string" office:string-value="Back 10 5 12" calcext:value-type="string">
            <text:p>Back 10 5 12</text:p>
          </table:table-cell>
          <table:table-cell table:style-name="ce2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formula="of:=[.M16]&amp;&quot; &quot;&amp;[.N16]&amp;&quot; &quot;&amp;[.O16]" office:value-type="string" office:string-value="10 9 4" calcext:value-type="string">
            <text:p>10 9 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17]&amp;&quot; &quot;&amp;[.B17]&amp;&quot; &quot;&amp;[.C17]&amp;&quot; &quot;&amp;[.D17]" office:value-type="string" office:string-value="Back 11 5 25" calcext:value-type="string">
            <text:p>Back 11 5 25</text:p>
          </table:table-cell>
          <table:table-cell table:style-name="ce2"/>
          <table:table-cell table:style-name="ce4" table:formula="of:=[.A17]" office:value-type="string" office:string-value="Back" calcext:value-type="string">
            <text:p>Back</text:p>
          </table:table-cell>
          <table:table-cell table:style-name="ce1" table:formula="of:=[.B17]" office:value-type="float" office:value="11" calcext:value-type="float">
            <text:p>11</text:p>
          </table:table-cell>
          <table:table-cell table:style-name="ce1" table:formula="of:=[.C17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17]&amp;&quot; &quot;&amp;[.H17]&amp;&quot; &quot;&amp;[.I17]&amp;&quot; &quot;&amp;[.J17]" office:value-type="string" office:string-value="Back 11 5 12" calcext:value-type="string">
            <text:p>Back 11 5 12</text:p>
          </table:table-cell>
          <table:table-cell table:style-name="ce2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formula="of:=[.M17]&amp;&quot; &quot;&amp;[.N17]&amp;&quot; &quot;&amp;[.O17]" office:value-type="string" office:string-value="15 9 4" calcext:value-type="string">
            <text:p>15 9 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18]&amp;&quot; &quot;&amp;[.B18]&amp;&quot; &quot;&amp;[.C18]&amp;&quot; &quot;&amp;[.D18]" office:value-type="string" office:string-value="Back 14 5 25" calcext:value-type="string">
            <text:p>Back 14 5 25</text:p>
          </table:table-cell>
          <table:table-cell table:style-name="ce2"/>
          <table:table-cell table:style-name="ce4" table:formula="of:=[.A14]" office:value-type="string" office:string-value="Back" calcext:value-type="string">
            <text:p>Back</text:p>
          </table:table-cell>
          <table:table-cell table:style-name="ce1" table:formula="of:=[.B18]" office:value-type="float" office:value="14" calcext:value-type="float">
            <text:p>14</text:p>
          </table:table-cell>
          <table:table-cell table:style-name="ce1" table:formula="of:=[.C18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18]&amp;&quot; &quot;&amp;[.H18]&amp;&quot; &quot;&amp;[.I18]&amp;&quot; &quot;&amp;[.J18]" office:value-type="string" office:string-value="Back 14 5 12" calcext:value-type="string">
            <text:p>Back 14 5 12</text:p>
          </table:table-cell>
          <table:table-cell table:style-name="ce2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formula="of:=[.M18]&amp;&quot; &quot;&amp;[.N18]&amp;&quot; &quot;&amp;[.O18]" office:value-type="string" office:string-value="20 9 4" calcext:value-type="string">
            <text:p>20 9 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19]&amp;&quot; &quot;&amp;[.B19]&amp;&quot; &quot;&amp;[.C19]&amp;&quot; &quot;&amp;[.D19]" office:value-type="string" office:string-value="Back 15 5 25" calcext:value-type="string">
            <text:p>Back 15 5 25</text:p>
          </table:table-cell>
          <table:table-cell table:style-name="ce2"/>
          <table:table-cell table:style-name="ce4" table:formula="of:=[.A15]" office:value-type="string" office:string-value="Back" calcext:value-type="string">
            <text:p>Back</text:p>
          </table:table-cell>
          <table:table-cell table:style-name="ce1" table:formula="of:=[.B19]" office:value-type="float" office:value="15" calcext:value-type="float">
            <text:p>15</text:p>
          </table:table-cell>
          <table:table-cell table:style-name="ce1" table:formula="of:=[.C19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19]&amp;&quot; &quot;&amp;[.H19]&amp;&quot; &quot;&amp;[.I19]&amp;&quot; &quot;&amp;[.J19]" office:value-type="string" office:string-value="Back 15 5 12" calcext:value-type="string">
            <text:p>Back 15 5 12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20]&amp;&quot; &quot;&amp;[.B20]&amp;&quot; &quot;&amp;[.C20]&amp;&quot; &quot;&amp;[.D20]" office:value-type="string" office:string-value="Back 18 5 25" calcext:value-type="string">
            <text:p>Back 18 5 25</text:p>
          </table:table-cell>
          <table:table-cell table:style-name="ce2"/>
          <table:table-cell table:style-name="ce4" table:formula="of:=[.A16]" office:value-type="string" office:string-value="Back" calcext:value-type="string">
            <text:p>Back</text:p>
          </table:table-cell>
          <table:table-cell table:style-name="ce1" table:formula="of:=[.B20]" office:value-type="float" office:value="18" calcext:value-type="float">
            <text:p>18</text:p>
          </table:table-cell>
          <table:table-cell table:style-name="ce1" table:formula="of:=[.C20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20]&amp;&quot; &quot;&amp;[.H20]&amp;&quot; &quot;&amp;[.I20]&amp;&quot; &quot;&amp;[.J20]" office:value-type="string" office:string-value="Back 18 5 12" calcext:value-type="string">
            <text:p>Back 18 5 12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21]&amp;&quot; &quot;&amp;[.B21]&amp;&quot; &quot;&amp;[.C21]&amp;&quot; &quot;&amp;[.D21]" office:value-type="string" office:string-value="Back 19 5 25" calcext:value-type="string">
            <text:p>Back 19 5 25</text:p>
          </table:table-cell>
          <table:table-cell table:style-name="ce2"/>
          <table:table-cell table:style-name="ce4" table:formula="of:=[.A17]" office:value-type="string" office:string-value="Back" calcext:value-type="string">
            <text:p>Back</text:p>
          </table:table-cell>
          <table:table-cell table:style-name="ce1" table:formula="of:=[.B21]" office:value-type="float" office:value="19" calcext:value-type="float">
            <text:p>19</text:p>
          </table:table-cell>
          <table:table-cell table:style-name="ce1" table:formula="of:=[.C21]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style-name="ce17" table:formula="of:=[.G21]&amp;&quot; &quot;&amp;[.H21]&amp;&quot; &quot;&amp;[.I21]&amp;&quot; &quot;&amp;[.J21]" office:value-type="string" office:string-value="Back 19 5 54" calcext:value-type="string">
            <text:p>Back 19 5 54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22]&amp;&quot; &quot;&amp;[.B22]&amp;&quot; &quot;&amp;[.C22]&amp;&quot; &quot;&amp;[.D22]" office:value-type="string" office:string-value="Back 22 5 25" calcext:value-type="string">
            <text:p>Back 22 5 25</text:p>
          </table:table-cell>
          <table:table-cell table:style-name="ce2"/>
          <table:table-cell table:style-name="ce4" table:formula="of:=[.A18]" office:value-type="string" office:string-value="Back" calcext:value-type="string">
            <text:p>Back</text:p>
          </table:table-cell>
          <table:table-cell table:style-name="ce1" table:formula="of:=[.B22]" office:value-type="float" office:value="22" calcext:value-type="float">
            <text:p>22</text:p>
          </table:table-cell>
          <table:table-cell table:style-name="ce1" table:formula="of:=[.C22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22]&amp;&quot; &quot;&amp;[.H22]&amp;&quot; &quot;&amp;[.I22]&amp;&quot; &quot;&amp;[.J22]" office:value-type="string" office:string-value="Back 22 5 12" calcext:value-type="string">
            <text:p>Back 22 5 12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23]&amp;&quot; &quot;&amp;[.B23]&amp;&quot; &quot;&amp;[.C23]&amp;&quot; &quot;&amp;[.D23]" office:value-type="string" office:string-value="Back 23 5 25" calcext:value-type="string">
            <text:p>Back 23 5 25</text:p>
          </table:table-cell>
          <table:table-cell table:style-name="ce2"/>
          <table:table-cell table:style-name="ce4" table:formula="of:=[.A19]" office:value-type="string" office:string-value="Back" calcext:value-type="string">
            <text:p>Back</text:p>
          </table:table-cell>
          <table:table-cell table:style-name="ce1" table:formula="of:=[.B23]" office:value-type="float" office:value="23" calcext:value-type="float">
            <text:p>23</text:p>
          </table:table-cell>
          <table:table-cell table:style-name="ce1" table:formula="of:=[.C23]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23]&amp;&quot; &quot;&amp;[.H23]&amp;&quot; &quot;&amp;[.I23]&amp;&quot; &quot;&amp;[.J23]" office:value-type="string" office:string-value="Back 23 5 12" calcext:value-type="string">
            <text:p>Back 23 5 12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24]&amp;&quot; &quot;&amp;[.B24]&amp;&quot; &quot;&amp;[.C24]&amp;&quot; &quot;&amp;[.D24]" office:value-type="string" office:string-value="Back 26 8 25" calcext:value-type="string">
            <text:p>Back 26 8 25</text:p>
          </table:table-cell>
          <table:table-cell table:style-name="ce2"/>
          <table:table-cell table:style-name="ce4" table:formula="of:=[.A20]" office:value-type="string" office:string-value="Back" calcext:value-type="string">
            <text:p>Back</text:p>
          </table:table-cell>
          <table:table-cell table:style-name="ce1" table:formula="of:=[.B24]" office:value-type="float" office:value="26" calcext:value-type="float">
            <text:p>26</text:p>
          </table:table-cell>
          <table:table-cell table:style-name="ce1" table:formula="of:=[.C24]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24]&amp;&quot; &quot;&amp;[.H24]&amp;&quot; &quot;&amp;[.I24]&amp;&quot; &quot;&amp;[.J24]" office:value-type="string" office:string-value="Back 26 8 12" calcext:value-type="string">
            <text:p>Back 26 8 12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7" table:formula="of:=[.A25]&amp;&quot; &quot;&amp;[.B25]&amp;&quot; &quot;&amp;[.C25]&amp;&quot; &quot;&amp;[.D25]" office:value-type="string" office:string-value="Back 27 8 25" calcext:value-type="string">
            <text:p>Back 27 8 25</text:p>
          </table:table-cell>
          <table:table-cell table:style-name="ce2"/>
          <table:table-cell table:style-name="ce4" table:formula="of:=[.A21]" office:value-type="string" office:string-value="Back" calcext:value-type="string">
            <text:p>Back</text:p>
          </table:table-cell>
          <table:table-cell table:style-name="ce1" table:formula="of:=[.B25]" office:value-type="float" office:value="27" calcext:value-type="float">
            <text:p>27</text:p>
          </table:table-cell>
          <table:table-cell table:style-name="ce1" table:formula="of:=[.C25]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7" table:formula="of:=[.G25]&amp;&quot; &quot;&amp;[.H25]&amp;&quot; &quot;&amp;[.I25]&amp;&quot; &quot;&amp;[.J25]" office:value-type="string" office:string-value="Back 27 8 12" calcext:value-type="string">
            <text:p>Back 27 8 12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14" table:number-columns-repeated="4"/>
          <table:table-cell table:style-name="ce23" table:formula="of:=COM.MICROSOFT.TEXTJOIN(&quot; &quot;; 1; [.E2:.E25])" office:value-type="string" office:string-value="Buildings 6 1 24 Buildings 7 1 24 Buildings 10 1 24 Buildings 11 1 24 Buildings 14 1 24 Buildings 15 1 24 Buildings 18 1 24 Buildings 19 1 24 Buildings 22 1 24 Buildings 23 1 24 Buildings 26 4 24 Buildings 27 4 24 Back 6 5 25 Back 7 5 25 Back 10 5 25 Back 11 5 25 Back 14 5 25 Back 15 5 25 Back 18 5 25 Back 19 5 25 Back 22 5 25 Back 23 5 25 Back 26 8 25 Back 27 8 25" calcext:value-type="string">
            <text:p>Buildings 6 1 24 Buildings 7 1 24 Buildings 10 1 24 Buildings 11 1 24 Buildings 14 1 24 Buildings 15 1 24 Buildings 18 1 24 Buildings 19 1 24 Buildings 22 1 24 Buildings 23 1 24 Buildings 26 4 24 Buildings 27 4 24 Back 6 5 25 Back 7 5 25 Back 10 5 25 Back 11 5 25 Back 14 5 25 Back 15 5 25 Back 18 5 25 Back 19 5 25 Back 22 5 25 Back 23 5 25 Back 26 8 25 Back 27 8 25</text:p>
          </table:table-cell>
          <table:table-cell table:style-name="ce12"/>
          <table:table-cell table:style-name="ce8"/>
          <table:table-cell table:style-name="ce12" table:number-columns-repeated="3"/>
          <table:table-cell table:style-name="ce23" table:formula="of:=COM.MICROSOFT.TEXTJOIN(&quot; &quot;; 1; [.K2:.K25])" office:value-type="string" office:string-value="Buildings 6 1 26 Buildings 7 1 26 Buildings 10 1 26 Buildings 11 1 26 Buildings 14 1 26 Buildings 15 1 26 Buildings 18 1 26 Buildings 19 1 26 Buildings 22 1 26 Buildings 23 1 26 Buildings 26 4 26 Buildings 27 4 26 Back 6 5 12 Back 7 5 12 Back 10 5 12 Back 11 5 12 Back 14 5 12 Back 15 5 12 Back 18 5 12 Back 19 5 54 Back 22 5 12 Back 23 5 12 Back 26 8 12 Back 27 8 12" calcext:value-type="string">
            <text:p>Buildings 6 1 26 Buildings 7 1 26 Buildings 10 1 26 Buildings 11 1 26 Buildings 14 1 26 Buildings 15 1 26 Buildings 18 1 26 Buildings 19 1 26 Buildings 22 1 26 Buildings 23 1 26 Buildings 26 4 26 Buildings 27 4 26 Back 6 5 12 Back 7 5 12 Back 10 5 12 Back 11 5 12 Back 14 5 12 Back 15 5 12 Back 18 5 12 Back 19 5 54 Back 22 5 12 Back 23 5 12 Back 26 8 12 Back 27 8 12</text:p>
          </table:table-cell>
          <table:table-cell table:style-name="ce12"/>
          <table:table-cell table:number-columns-repeated="3"/>
          <table:table-cell table:style-name="ce29" table:formula="of:=COM.MICROSOFT.TEXTJOIN(&quot; &quot;; 1; [.P2:.P21])" office:value-type="string" office:string-value="3 5 4 6 5 4 7 5 4 10 5 4 11 5 4 14 5 4 15 5 4 18 5 4 19 5 4 22 5 4 23 5 4 26 8 4 27 8 4 5 9 4 10 9 4 15 9 4 20 9 4" calcext:value-type="string">
            <text:p>3 5 4 6 5 4 7 5 4 10 5 4 11 5 4 14 5 4 15 5 4 18 5 4 19 5 4 22 5 4 23 5 4 26 8 4 27 8 4 5 9 4 10 9 4 15 9 4 20 9 4</text:p>
          </table:table-cell>
        </table:table-row>
        <table:table-row table:style-name="ro1" table:number-rows-repeated="3">
          <table:table-cell table:style-name="ce14" table:number-columns-repeated="4"/>
          <table:table-cell table:style-name="ce20"/>
          <table:table-cell table:style-name="ce12"/>
          <table:table-cell table:style-name="ce8"/>
          <table:table-cell table:style-name="ce12" table:number-columns-repeated="3"/>
          <table:table-cell table:style-name="ce22"/>
          <table:table-cell table:style-name="ce12"/>
          <table:table-cell table:number-columns-repeated="4"/>
        </table:table-row>
        <table:table-row table:style-name="ro1" table:number-rows-repeated="32">
          <table:table-cell table:style-name="ce8"/>
          <table:table-cell table:style-name="ce12" table:number-columns-repeated="3"/>
          <table:table-cell table:style-name="ce22"/>
          <table:table-cell table:style-name="ce12"/>
          <table:table-cell table:style-name="ce8"/>
          <table:table-cell table:style-name="ce12" table:number-columns-repeated="3"/>
          <table:table-cell table:style-name="ce22"/>
          <table:table-cell table:style-name="ce12"/>
          <table:table-cell table:number-columns-repeated="4"/>
        </table:table-row>
        <table:table-row table:style-name="ro1" table:number-rows-repeated="4">
          <table:table-cell table:style-name="ce8"/>
          <table:table-cell table:style-name="ce12"/>
          <table:table-cell table:style-name="ce15"/>
          <table:table-cell table:style-name="ce12"/>
          <table:table-cell table:style-name="ce22"/>
          <table:table-cell table:style-name="ce12"/>
          <table:table-cell table:style-name="ce8"/>
          <table:table-cell table:style-name="ce12" table:number-columns-repeated="3"/>
          <table:table-cell table:style-name="ce22"/>
          <table:table-cell table:style-name="ce12"/>
          <table:table-cell table:number-columns-repeated="4"/>
        </table:table-row>
        <table:table-row table:style-name="ro1" table:number-rows-repeated="16">
          <table:table-cell table:style-name="ce8"/>
          <table:table-cell table:style-name="ce12" table:number-columns-repeated="3"/>
          <table:table-cell table:style-name="ce22"/>
          <table:table-cell table:style-name="ce12"/>
          <table:table-cell table:style-name="ce8"/>
          <table:table-cell table:style-name="ce12" table:number-columns-repeated="3"/>
          <table:table-cell table:style-name="ce22"/>
          <table:table-cell table:style-name="ce12"/>
          <table:table-cell table:number-columns-repeated="4"/>
        </table:table-row>
        <table:table-row table:style-name="ro1">
          <table:table-cell table:style-name="ce4"/>
          <table:table-cell table:style-name="ce1" table:number-columns-repeated="3"/>
          <table:table-cell table:style-name="ce17"/>
          <table:table-cell table:style-name="ce1"/>
          <table:table-cell table:style-name="ce4"/>
          <table:table-cell table:style-name="ce1" table:number-columns-repeated="3"/>
          <table:table-cell table:style-name="ce17"/>
          <table:table-cell table:style-name="ce12"/>
          <table:table-cell table:style-name="Default" table:number-columns-repeated="3"/>
          <table:table-cell/>
        </table:table-row>
        <table:table-row table:style-name="ro1" table:number-rows-repeated="7">
          <table:table-cell table:number-columns-repeated="11"/>
          <table:table-cell table:style-name="ce14"/>
          <table:table-cell table:style-name="Default" table:number-columns-repeated="3"/>
          <table:table-cell/>
        </table:table-row>
        <table:table-row table:style-name="ro1" table:number-rows-repeated="104848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Light" svg:font-family="'Roboto Light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2:38:51.203926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21:45:37.948027807</meta:creation-date>
    <dc:date>2026-05-15T12:39:31.563941431</dc:date>
    <meta:editing-duration>PT1H8M25S</meta:editing-duration>
    <meta:editing-cycles>26</meta:editing-cycles>
    <meta:generator>LibreOffice/26.2.3.2$Linux_X86_64 LibreOffice_project/620$Build-2</meta:generator>
    <meta:document-statistic meta:table-count="1" meta:cell-count="314" meta:object-count="0"/>
  </office:meta>
</office:document-meta>
</file>