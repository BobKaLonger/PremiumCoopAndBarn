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Light" svg:font-family="'Roboto Light'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1937in"/>
    </style:style>
    <style:style style:name="co5" style:family="table-column">
      <style:table-column-properties fo:break-before="auto" style:column-width="0.2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3.5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7"/>
        <table:table-column table:style-name="co5" table:default-cell-style-name="ce6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7"/>
        <table:table-column table:style-name="co5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6" table:default-cell-style-name="ce19"/>
        <table:table-column table:style-name="co7" table:number-columns-repeated="13" table:default-cell-style-name="Default"/>
        <table:table-column table:style-name="co7" table:number-columns-repeated="16355"/>
        <table:table-row table:style-name="ro1">
          <table:table-cell table:style-name="ce1" office:value-type="string" calcext:value-type="string" table:number-columns-spanned="4" table:number-rows-spanned="1">
            <text:p>Day Tiles</text:p>
          </table:table-cell>
          <table:covered-table-cell table:number-columns-repeated="3" table:style-name="ce1"/>
          <table:table-cell/>
          <table:table-cell table:style-name="ce4"/>
          <table:table-cell table:style-name="ce1" office:value-type="string" calcext:value-type="string" table:number-columns-spanned="4" table:number-rows-spanned="1">
            <text:p>Night Tiles</text:p>
          </table:table-cell>
          <table:covered-table-cell table:number-columns-repeated="3" table:style-name="ce1"/>
          <table:table-cell/>
          <table:table-cell table:style-name="ce4"/>
          <table:table-cell table:style-name="ce14" office:value-type="string" calcext:value-type="string" table:number-columns-spanned="3" table:number-rows-spanned="1">
            <text:p>lights</text:p>
          </table:table-cell>
          <table:covered-table-cell table:number-columns-repeated="2" table:style-name="Default"/>
          <table:table-cell table:number-columns-repeated="14"/>
          <table:table-cell table:style-name="ce6" table:number-columns-repeated="16355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2]&amp;&quot; &quot;&amp;[.B2]&amp;&quot; &quot;&amp;[.C2]&amp;&quot; &quot;&amp;[.D2]" office:value-type="string" office:string-value="Buildings 3 1 24" calcext:value-type="string">
            <text:p>Buildings 3 1 24</text:p>
          </table:table-cell>
          <table:table-cell table:style-name="ce4"/>
          <table:table-cell table:style-name="ce9" table:formula="of:=[.A2]" office:value-type="string" office:string-value="Buildings" calcext:value-type="string">
            <text:p>Buildings</text:p>
          </table:table-cell>
          <table:table-cell table:style-name="ce17" table:formula="of:=[.B2]" office:value-type="float" office:value="3" calcext:value-type="float">
            <text:p>3</text:p>
          </table:table-cell>
          <table:table-cell table:style-name="ce17" table:formula="of:=[.C2]" office:value-type="float" office:value="1" calcext:value-type="float">
            <text:p>1</text:p>
          </table:table-cell>
          <table:table-cell table:style-name="ce17" office:value-type="float" office:value="26" calcext:value-type="float">
            <text:p>26</text:p>
          </table:table-cell>
          <table:table-cell table:style-name="ce19" table:formula="of:=[.G2]&amp;&quot; &quot;&amp;[.H2]&amp;&quot; &quot;&amp;[.I2]&amp;&quot; &quot;&amp;[.J2]" office:value-type="string" office:string-value="Buildings 3 1 26" calcext:value-type="string">
            <text:p>Buildings 3 1 26</text:p>
          </table:table-cell>
          <table:table-cell table:style-name="ce4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formula="of:=[.M2]&amp;&quot; &quot;&amp;[.N2]&amp;&quot; &quot;&amp;[.O2]" office:value-type="string" office:string-value="3 5 4" calcext:value-type="string">
            <text:p>3 5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3]&amp;&quot; &quot;&amp;[.B3]&amp;&quot; &quot;&amp;[.C3]&amp;&quot; &quot;&amp;[.D3]" office:value-type="string" office:string-value="Buildings 4 1 24" calcext:value-type="string">
            <text:p>Buildings 4 1 24</text:p>
          </table:table-cell>
          <table:table-cell table:style-name="ce4"/>
          <table:table-cell table:style-name="ce9" table:formula="of:=[.A3]" office:value-type="string" office:string-value="Buildings" calcext:value-type="string">
            <text:p>Buildings</text:p>
          </table:table-cell>
          <table:table-cell table:style-name="ce17" table:formula="of:=[.B3]" office:value-type="float" office:value="4" calcext:value-type="float">
            <text:p>4</text:p>
          </table:table-cell>
          <table:table-cell table:style-name="ce17" table:formula="of:=[.C3]" office:value-type="float" office:value="1" calcext:value-type="float">
            <text:p>1</text:p>
          </table:table-cell>
          <table:table-cell table:style-name="ce17" office:value-type="float" office:value="26" calcext:value-type="float">
            <text:p>26</text:p>
          </table:table-cell>
          <table:table-cell table:style-name="ce19" table:formula="of:=[.G3]&amp;&quot; &quot;&amp;[.H3]&amp;&quot; &quot;&amp;[.I3]&amp;&quot; &quot;&amp;[.J3]" office:value-type="string" office:string-value="Buildings 4 1 26" calcext:value-type="string">
            <text:p>Buildings 4 1 26</text:p>
          </table:table-cell>
          <table:table-cell table:style-name="ce4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formula="of:=[.M3]&amp;&quot; &quot;&amp;[.N3]&amp;&quot; &quot;&amp;[.O3]" office:value-type="string" office:string-value="4 5 4" calcext:value-type="string">
            <text:p>4 5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&amp;&quot; &quot;&amp;[.B4]&amp;&quot; &quot;&amp;[.C4]&amp;&quot; &quot;&amp;[.D4]" office:value-type="string" office:string-value="Buildings 7 1 24" calcext:value-type="string">
            <text:p>Buildings 7 1 24</text:p>
          </table:table-cell>
          <table:table-cell table:style-name="ce4"/>
          <table:table-cell table:style-name="ce9" table:formula="of:=[.A4]" office:value-type="string" office:string-value="Buildings" calcext:value-type="string">
            <text:p>Buildings</text:p>
          </table:table-cell>
          <table:table-cell table:style-name="ce17" table:formula="of:=[.B4]" office:value-type="float" office:value="7" calcext:value-type="float">
            <text:p>7</text:p>
          </table:table-cell>
          <table:table-cell table:style-name="ce17" table:formula="of:=[.C4]" office:value-type="float" office:value="1" calcext:value-type="float">
            <text:p>1</text:p>
          </table:table-cell>
          <table:table-cell table:style-name="ce17" office:value-type="float" office:value="26" calcext:value-type="float">
            <text:p>26</text:p>
          </table:table-cell>
          <table:table-cell table:style-name="ce19" table:formula="of:=[.G4]&amp;&quot; &quot;&amp;[.H4]&amp;&quot; &quot;&amp;[.I4]&amp;&quot; &quot;&amp;[.J4]" office:value-type="string" office:string-value="Buildings 7 1 26" calcext:value-type="string">
            <text:p>Buildings 7 1 26</text:p>
          </table:table-cell>
          <table:table-cell table:style-name="ce4"/>
          <table:table-cell table:style-name="ce17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formula="of:=[.M4]&amp;&quot; &quot;&amp;[.N4]&amp;&quot; &quot;&amp;[.O4]" office:value-type="string" office:string-value="7 5 4" calcext:value-type="string">
            <text:p>7 5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5]&amp;&quot; &quot;&amp;[.B5]&amp;&quot; &quot;&amp;[.C5]&amp;&quot; &quot;&amp;[.D5]" office:value-type="string" office:string-value="Buildings 8 1 24" calcext:value-type="string">
            <text:p>Buildings 8 1 24</text:p>
          </table:table-cell>
          <table:table-cell table:style-name="ce4"/>
          <table:table-cell table:style-name="ce9" table:formula="of:=[.A5]" office:value-type="string" office:string-value="Buildings" calcext:value-type="string">
            <text:p>Buildings</text:p>
          </table:table-cell>
          <table:table-cell table:style-name="ce17" table:formula="of:=[.B5]" office:value-type="float" office:value="8" calcext:value-type="float">
            <text:p>8</text:p>
          </table:table-cell>
          <table:table-cell table:style-name="ce17" table:formula="of:=[.C5]" office:value-type="float" office:value="1" calcext:value-type="float">
            <text:p>1</text:p>
          </table:table-cell>
          <table:table-cell table:style-name="ce17" office:value-type="float" office:value="26" calcext:value-type="float">
            <text:p>26</text:p>
          </table:table-cell>
          <table:table-cell table:style-name="ce19" table:formula="of:=[.G5]&amp;&quot; &quot;&amp;[.H5]&amp;&quot; &quot;&amp;[.I5]&amp;&quot; &quot;&amp;[.J5]" office:value-type="string" office:string-value="Buildings 8 1 26" calcext:value-type="string">
            <text:p>Buildings 8 1 26</text:p>
          </table:table-cell>
          <table:table-cell table:style-name="ce4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formula="of:=[.M5]&amp;&quot; &quot;&amp;[.N5]&amp;&quot; &quot;&amp;[.O5]" office:value-type="string" office:string-value="8 5 4" calcext:value-type="string">
            <text:p>8 5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6]&amp;&quot; &quot;&amp;[.B6]&amp;&quot; &quot;&amp;[.C6]&amp;&quot; &quot;&amp;[.D6]" office:value-type="string" office:string-value="Buildings 11 1 24" calcext:value-type="string">
            <text:p>Buildings 11 1 24</text:p>
          </table:table-cell>
          <table:table-cell table:style-name="ce4"/>
          <table:table-cell table:style-name="ce9" table:formula="of:=[.A6]" office:value-type="string" office:string-value="Buildings" calcext:value-type="string">
            <text:p>Buildings</text:p>
          </table:table-cell>
          <table:table-cell table:style-name="ce17" table:formula="of:=[.B6]" office:value-type="float" office:value="11" calcext:value-type="float">
            <text:p>11</text:p>
          </table:table-cell>
          <table:table-cell table:style-name="ce17" table:formula="of:=[.C6]" office:value-type="float" office:value="1" calcext:value-type="float">
            <text:p>1</text:p>
          </table:table-cell>
          <table:table-cell table:style-name="ce17" office:value-type="float" office:value="26" calcext:value-type="float">
            <text:p>26</text:p>
          </table:table-cell>
          <table:table-cell table:style-name="ce19" table:formula="of:=[.G6]&amp;&quot; &quot;&amp;[.H6]&amp;&quot; &quot;&amp;[.I6]&amp;&quot; &quot;&amp;[.J6]" office:value-type="string" office:string-value="Buildings 11 1 26" calcext:value-type="string">
            <text:p>Buildings 11 1 26</text:p>
          </table:table-cell>
          <table:table-cell table:style-name="ce4"/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formula="of:=[.M6]&amp;&quot; &quot;&amp;[.N6]&amp;&quot; &quot;&amp;[.O6]" office:value-type="string" office:string-value="11 5 4" calcext:value-type="string">
            <text:p>11 5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7]&amp;&quot; &quot;&amp;[.B7]&amp;&quot; &quot;&amp;[.C7]&amp;&quot; &quot;&amp;[.D7]" office:value-type="string" office:string-value="Buildings 12 1 24" calcext:value-type="string">
            <text:p>Buildings 12 1 24</text:p>
          </table:table-cell>
          <table:table-cell table:style-name="ce4"/>
          <table:table-cell table:style-name="ce9" table:formula="of:=[.A7]" office:value-type="string" office:string-value="Buildings" calcext:value-type="string">
            <text:p>Buildings</text:p>
          </table:table-cell>
          <table:table-cell table:style-name="ce17" table:formula="of:=[.B7]" office:value-type="float" office:value="12" calcext:value-type="float">
            <text:p>12</text:p>
          </table:table-cell>
          <table:table-cell table:style-name="ce17" table:formula="of:=[.C7]" office:value-type="float" office:value="1" calcext:value-type="float">
            <text:p>1</text:p>
          </table:table-cell>
          <table:table-cell table:style-name="ce17" office:value-type="float" office:value="26" calcext:value-type="float">
            <text:p>26</text:p>
          </table:table-cell>
          <table:table-cell table:style-name="ce19" table:formula="of:=[.G7]&amp;&quot; &quot;&amp;[.H7]&amp;&quot; &quot;&amp;[.I7]&amp;&quot; &quot;&amp;[.J7]" office:value-type="string" office:string-value="Buildings 12 1 26" calcext:value-type="string">
            <text:p>Buildings 12 1 26</text:p>
          </table:table-cell>
          <table:table-cell table:style-name="ce4"/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formula="of:=[.M7]&amp;&quot; &quot;&amp;[.N7]&amp;&quot; &quot;&amp;[.O7]" office:value-type="string" office:string-value="12 5 4" calcext:value-type="string">
            <text:p>12 5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8]&amp;&quot; &quot;&amp;[.B8]&amp;&quot; &quot;&amp;[.C8]&amp;&quot; &quot;&amp;[.D8]" office:value-type="string" office:string-value="Buildings 15 1 24" calcext:value-type="string">
            <text:p>Buildings 15 1 24</text:p>
          </table:table-cell>
          <table:table-cell table:style-name="ce4"/>
          <table:table-cell table:style-name="ce9" table:formula="of:=[.A8]" office:value-type="string" office:string-value="Buildings" calcext:value-type="string">
            <text:p>Buildings</text:p>
          </table:table-cell>
          <table:table-cell table:style-name="ce17" table:formula="of:=[.B8]" office:value-type="float" office:value="15" calcext:value-type="float">
            <text:p>15</text:p>
          </table:table-cell>
          <table:table-cell table:style-name="ce17" table:formula="of:=[.C8]" office:value-type="float" office:value="1" calcext:value-type="float">
            <text:p>1</text:p>
          </table:table-cell>
          <table:table-cell table:style-name="ce17" office:value-type="float" office:value="26" calcext:value-type="float">
            <text:p>26</text:p>
          </table:table-cell>
          <table:table-cell table:style-name="ce19" table:formula="of:=[.G8]&amp;&quot; &quot;&amp;[.H8]&amp;&quot; &quot;&amp;[.I8]&amp;&quot; &quot;&amp;[.J8]" office:value-type="string" office:string-value="Buildings 15 1 26" calcext:value-type="string">
            <text:p>Buildings 15 1 26</text:p>
          </table:table-cell>
          <table:table-cell table:style-name="ce4"/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formula="of:=[.M8]&amp;&quot; &quot;&amp;[.N8]&amp;&quot; &quot;&amp;[.O8]" office:value-type="string" office:string-value="15 5 4" calcext:value-type="string">
            <text:p>15 5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9]&amp;&quot; &quot;&amp;[.B9]&amp;&quot; &quot;&amp;[.C9]&amp;&quot; &quot;&amp;[.D9]" office:value-type="string" office:string-value="Buildings 16 1 24" calcext:value-type="string">
            <text:p>Buildings 16 1 24</text:p>
          </table:table-cell>
          <table:table-cell table:style-name="ce4"/>
          <table:table-cell table:style-name="ce9" table:formula="of:=[.A9]" office:value-type="string" office:string-value="Buildings" calcext:value-type="string">
            <text:p>Buildings</text:p>
          </table:table-cell>
          <table:table-cell table:style-name="ce17" table:formula="of:=[.B9]" office:value-type="float" office:value="16" calcext:value-type="float">
            <text:p>16</text:p>
          </table:table-cell>
          <table:table-cell table:style-name="ce17" table:formula="of:=[.C9]" office:value-type="float" office:value="1" calcext:value-type="float">
            <text:p>1</text:p>
          </table:table-cell>
          <table:table-cell table:style-name="ce17" office:value-type="float" office:value="26" calcext:value-type="float">
            <text:p>26</text:p>
          </table:table-cell>
          <table:table-cell table:style-name="ce19" table:formula="of:=[.G9]&amp;&quot; &quot;&amp;[.H9]&amp;&quot; &quot;&amp;[.I9]&amp;&quot; &quot;&amp;[.J9]" office:value-type="string" office:string-value="Buildings 16 1 26" calcext:value-type="string">
            <text:p>Buildings 16 1 26</text:p>
          </table:table-cell>
          <table:table-cell table:style-name="ce4"/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formula="of:=[.M9]&amp;&quot; &quot;&amp;[.N9]&amp;&quot; &quot;&amp;[.O9]" office:value-type="string" office:string-value="16 5 4" calcext:value-type="string">
            <text:p>16 5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10]&amp;&quot; &quot;&amp;[.B10]&amp;&quot; &quot;&amp;[.C10]&amp;&quot; &quot;&amp;[.D10]" office:value-type="string" office:string-value="Buildings 19 1 24" calcext:value-type="string">
            <text:p>Buildings 19 1 24</text:p>
          </table:table-cell>
          <table:table-cell table:style-name="ce4"/>
          <table:table-cell table:style-name="ce9" table:formula="of:=[.A10]" office:value-type="string" office:string-value="Buildings" calcext:value-type="string">
            <text:p>Buildings</text:p>
          </table:table-cell>
          <table:table-cell table:style-name="ce17" table:formula="of:=[.B10]" office:value-type="float" office:value="19" calcext:value-type="float">
            <text:p>19</text:p>
          </table:table-cell>
          <table:table-cell table:style-name="ce17" table:formula="of:=[.C10]" office:value-type="float" office:value="1" calcext:value-type="float">
            <text:p>1</text:p>
          </table:table-cell>
          <table:table-cell table:style-name="ce17" office:value-type="float" office:value="26" calcext:value-type="float">
            <text:p>26</text:p>
          </table:table-cell>
          <table:table-cell table:style-name="ce19" table:formula="of:=[.G10]&amp;&quot; &quot;&amp;[.H10]&amp;&quot; &quot;&amp;[.I10]&amp;&quot; &quot;&amp;[.J10]" office:value-type="string" office:string-value="Buildings 19 1 26" calcext:value-type="string">
            <text:p>Buildings 19 1 26</text:p>
          </table:table-cell>
          <table:table-cell table:style-name="ce4"/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formula="of:=[.M10]&amp;&quot; &quot;&amp;[.N10]&amp;&quot; &quot;&amp;[.O10]" office:value-type="string" office:string-value="19 5 4" calcext:value-type="string">
            <text:p>19 5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11]&amp;&quot; &quot;&amp;[.B11]&amp;&quot; &quot;&amp;[.C11]&amp;&quot; &quot;&amp;[.D11]" office:value-type="string" office:string-value="Buildings 20 1 24" calcext:value-type="string">
            <text:p>Buildings 20 1 24</text:p>
          </table:table-cell>
          <table:table-cell table:style-name="ce4"/>
          <table:table-cell table:style-name="ce9" table:formula="of:=[.A11]" office:value-type="string" office:string-value="Buildings" calcext:value-type="string">
            <text:p>Buildings</text:p>
          </table:table-cell>
          <table:table-cell table:style-name="ce17" table:formula="of:=[.B11]" office:value-type="float" office:value="20" calcext:value-type="float">
            <text:p>20</text:p>
          </table:table-cell>
          <table:table-cell table:style-name="ce17" table:formula="of:=[.C11]" office:value-type="float" office:value="1" calcext:value-type="float">
            <text:p>1</text:p>
          </table:table-cell>
          <table:table-cell table:style-name="ce17" office:value-type="float" office:value="26" calcext:value-type="float">
            <text:p>26</text:p>
          </table:table-cell>
          <table:table-cell table:style-name="ce19" table:formula="of:=[.G11]&amp;&quot; &quot;&amp;[.H11]&amp;&quot; &quot;&amp;[.I11]&amp;&quot; &quot;&amp;[.J11]" office:value-type="string" office:string-value="Buildings 20 1 26" calcext:value-type="string">
            <text:p>Buildings 20 1 26</text:p>
          </table:table-cell>
          <table:table-cell table:style-name="ce4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formula="of:=[.M11]&amp;&quot; &quot;&amp;[.N11]&amp;&quot; &quot;&amp;[.O11]" office:value-type="string" office:string-value="20 5 4" calcext:value-type="string">
            <text:p>20 5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12]&amp;&quot; &quot;&amp;[.B12]&amp;&quot; &quot;&amp;[.C12]&amp;&quot; &quot;&amp;[.D12]" office:value-type="string" office:string-value="Buildings 23 1 24" calcext:value-type="string">
            <text:p>Buildings 23 1 24</text:p>
          </table:table-cell>
          <table:table-cell table:style-name="ce4"/>
          <table:table-cell table:style-name="ce9" table:formula="of:=[.A12]" office:value-type="string" office:string-value="Buildings" calcext:value-type="string">
            <text:p>Buildings</text:p>
          </table:table-cell>
          <table:table-cell table:style-name="ce17" table:formula="of:=[.B12]" office:value-type="float" office:value="23" calcext:value-type="float">
            <text:p>23</text:p>
          </table:table-cell>
          <table:table-cell table:style-name="ce17" table:formula="of:=[.C12]" office:value-type="float" office:value="1" calcext:value-type="float">
            <text:p>1</text:p>
          </table:table-cell>
          <table:table-cell table:style-name="ce17" office:value-type="float" office:value="26" calcext:value-type="float">
            <text:p>26</text:p>
          </table:table-cell>
          <table:table-cell table:style-name="ce19" table:formula="of:=[.G12]&amp;&quot; &quot;&amp;[.H12]&amp;&quot; &quot;&amp;[.I12]&amp;&quot; &quot;&amp;[.J12]" office:value-type="string" office:string-value="Buildings 23 1 26" calcext:value-type="string">
            <text:p>Buildings 23 1 26</text:p>
          </table:table-cell>
          <table:table-cell table:style-name="ce4"/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formula="of:=[.M12]&amp;&quot; &quot;&amp;[.N12]&amp;&quot; &quot;&amp;[.O12]" office:value-type="string" office:string-value="23 5 4" calcext:value-type="string">
            <text:p>23 5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13]&amp;&quot; &quot;&amp;[.B13]&amp;&quot; &quot;&amp;[.C13]&amp;&quot; &quot;&amp;[.D13]" office:value-type="string" office:string-value="Buildings 24 1 24" calcext:value-type="string">
            <text:p>Buildings 24 1 24</text:p>
          </table:table-cell>
          <table:table-cell table:style-name="ce4"/>
          <table:table-cell table:style-name="ce9" table:formula="of:=[.A13]" office:value-type="string" office:string-value="Buildings" calcext:value-type="string">
            <text:p>Buildings</text:p>
          </table:table-cell>
          <table:table-cell table:style-name="ce17" table:formula="of:=[.B13]" office:value-type="float" office:value="24" calcext:value-type="float">
            <text:p>24</text:p>
          </table:table-cell>
          <table:table-cell table:style-name="ce17" table:formula="of:=[.C13]" office:value-type="float" office:value="1" calcext:value-type="float">
            <text:p>1</text:p>
          </table:table-cell>
          <table:table-cell table:style-name="ce17" office:value-type="float" office:value="26" calcext:value-type="float">
            <text:p>26</text:p>
          </table:table-cell>
          <table:table-cell table:style-name="ce19" table:formula="of:=[.G13]&amp;&quot; &quot;&amp;[.H13]&amp;&quot; &quot;&amp;[.I13]&amp;&quot; &quot;&amp;[.J13]" office:value-type="string" office:string-value="Buildings 24 1 26" calcext:value-type="string">
            <text:p>Buildings 24 1 26</text:p>
          </table:table-cell>
          <table:table-cell table:style-name="ce4"/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formula="of:=[.M13]&amp;&quot; &quot;&amp;[.N13]&amp;&quot; &quot;&amp;[.O13]" office:value-type="string" office:string-value="24 5 4" calcext:value-type="string">
            <text:p>24 5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ack</text:p>
          </table:table-cell>
          <table:table-cell table:formula="of:=[.B2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A14]&amp;&quot; &quot;&amp;[.B14]&amp;&quot; &quot;&amp;[.C14]&amp;&quot; &quot;&amp;[.D14]" office:value-type="string" office:string-value="Back 3 5 25" calcext:value-type="string">
            <text:p>Back 3 5 25</text:p>
          </table:table-cell>
          <table:table-cell table:style-name="ce4"/>
          <table:table-cell table:style-name="ce9" table:formula="of:=[.A14]" office:value-type="string" office:string-value="Back" calcext:value-type="string">
            <text:p>Back</text:p>
          </table:table-cell>
          <table:table-cell table:style-name="ce17" table:formula="of:=[.B14]" office:value-type="float" office:value="3" calcext:value-type="float">
            <text:p>3</text:p>
          </table:table-cell>
          <table:table-cell table:style-name="ce17" table:formula="of:=[.C14]" office:value-type="float" office:value="5" calcext:value-type="float">
            <text:p>5</text:p>
          </table:table-cell>
          <table:table-cell table:style-name="ce17" office:value-type="float" office:value="12" calcext:value-type="float">
            <text:p>12</text:p>
          </table:table-cell>
          <table:table-cell table:style-name="ce19" table:formula="of:=[.G14]&amp;&quot; &quot;&amp;[.H14]&amp;&quot; &quot;&amp;[.I14]&amp;&quot; &quot;&amp;[.J14]" office:value-type="string" office:string-value="Back 3 5 12" calcext:value-type="string">
            <text:p>Back 3 5 12</text:p>
          </table:table-cell>
          <table:table-cell table:style-name="ce4"/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4" calcext:value-type="float">
            <text:p>4</text:p>
          </table:table-cell>
          <table:table-cell table:formula="of:=[.M14]&amp;&quot; &quot;&amp;[.N14]&amp;&quot; &quot;&amp;[.O14]" office:value-type="string" office:string-value="11 9 4" calcext:value-type="string">
            <text:p>11 9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ack</text:p>
          </table:table-cell>
          <table:table-cell table:formula="of:=[.B3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A15]&amp;&quot; &quot;&amp;[.B15]&amp;&quot; &quot;&amp;[.C15]&amp;&quot; &quot;&amp;[.D15]" office:value-type="string" office:string-value="Back 4 5 25" calcext:value-type="string">
            <text:p>Back 4 5 25</text:p>
          </table:table-cell>
          <table:table-cell table:style-name="ce4"/>
          <table:table-cell table:style-name="ce9" table:formula="of:=[.A15]" office:value-type="string" office:string-value="Back" calcext:value-type="string">
            <text:p>Back</text:p>
          </table:table-cell>
          <table:table-cell table:style-name="ce17" table:formula="of:=[.B15]" office:value-type="float" office:value="4" calcext:value-type="float">
            <text:p>4</text:p>
          </table:table-cell>
          <table:table-cell table:style-name="ce17" table:formula="of:=[.C15]" office:value-type="float" office:value="5" calcext:value-type="float">
            <text:p>5</text:p>
          </table:table-cell>
          <table:table-cell table:style-name="ce17" office:value-type="float" office:value="12" calcext:value-type="float">
            <text:p>12</text:p>
          </table:table-cell>
          <table:table-cell table:style-name="ce19" table:formula="of:=[.G15]&amp;&quot; &quot;&amp;[.H15]&amp;&quot; &quot;&amp;[.I15]&amp;&quot; &quot;&amp;[.J15]" office:value-type="string" office:string-value="Back 4 5 12" calcext:value-type="string">
            <text:p>Back 4 5 12</text:p>
          </table:table-cell>
          <table:table-cell table:style-name="ce4"/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4" calcext:value-type="float">
            <text:p>4</text:p>
          </table:table-cell>
          <table:table-cell table:formula="of:=[.M15]&amp;&quot; &quot;&amp;[.N15]&amp;&quot; &quot;&amp;[.O15]" office:value-type="string" office:string-value="16 9 4" calcext:value-type="string">
            <text:p>16 9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ack</text:p>
          </table:table-cell>
          <table:table-cell table:formula="of:=[.B4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A16]&amp;&quot; &quot;&amp;[.B16]&amp;&quot; &quot;&amp;[.C16]&amp;&quot; &quot;&amp;[.D16]" office:value-type="string" office:string-value="Back 7 5 25" calcext:value-type="string">
            <text:p>Back 7 5 25</text:p>
          </table:table-cell>
          <table:table-cell table:style-name="ce4"/>
          <table:table-cell table:style-name="ce9" table:formula="of:=[.A16]" office:value-type="string" office:string-value="Back" calcext:value-type="string">
            <text:p>Back</text:p>
          </table:table-cell>
          <table:table-cell table:style-name="ce17" table:formula="of:=[.B16]" office:value-type="float" office:value="7" calcext:value-type="float">
            <text:p>7</text:p>
          </table:table-cell>
          <table:table-cell table:style-name="ce17" table:formula="of:=[.C16]" office:value-type="float" office:value="5" calcext:value-type="float">
            <text:p>5</text:p>
          </table:table-cell>
          <table:table-cell table:style-name="ce17" office:value-type="float" office:value="12" calcext:value-type="float">
            <text:p>12</text:p>
          </table:table-cell>
          <table:table-cell table:style-name="ce19" table:formula="of:=[.G16]&amp;&quot; &quot;&amp;[.H16]&amp;&quot; &quot;&amp;[.I16]&amp;&quot; &quot;&amp;[.J16]" office:value-type="string" office:string-value="Back 7 5 12" calcext:value-type="string">
            <text:p>Back 7 5 12</text:p>
          </table:table-cell>
          <table:table-cell table:style-name="ce4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4" calcext:value-type="float">
            <text:p>4</text:p>
          </table:table-cell>
          <table:table-cell table:formula="of:=[.M16]&amp;&quot; &quot;&amp;[.N16]&amp;&quot; &quot;&amp;[.O16]" office:value-type="string" office:string-value="3 13 4" calcext:value-type="string">
            <text:p>3 13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ack</text:p>
          </table:table-cell>
          <table:table-cell table:formula="of:=[.B5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A17]&amp;&quot; &quot;&amp;[.B17]&amp;&quot; &quot;&amp;[.C17]&amp;&quot; &quot;&amp;[.D17]" office:value-type="string" office:string-value="Back 8 5 25" calcext:value-type="string">
            <text:p>Back 8 5 25</text:p>
          </table:table-cell>
          <table:table-cell table:style-name="ce4"/>
          <table:table-cell table:style-name="ce9" table:formula="of:=[.A17]" office:value-type="string" office:string-value="Back" calcext:value-type="string">
            <text:p>Back</text:p>
          </table:table-cell>
          <table:table-cell table:style-name="ce17" table:formula="of:=[.B17]" office:value-type="float" office:value="8" calcext:value-type="float">
            <text:p>8</text:p>
          </table:table-cell>
          <table:table-cell table:style-name="ce17" table:formula="of:=[.C17]" office:value-type="float" office:value="5" calcext:value-type="float">
            <text:p>5</text:p>
          </table:table-cell>
          <table:table-cell table:style-name="ce17" office:value-type="float" office:value="12" calcext:value-type="float">
            <text:p>12</text:p>
          </table:table-cell>
          <table:table-cell table:style-name="ce19" table:formula="of:=[.G17]&amp;&quot; &quot;&amp;[.H17]&amp;&quot; &quot;&amp;[.I17]&amp;&quot; &quot;&amp;[.J17]" office:value-type="string" office:string-value="Back 8 5 12" calcext:value-type="string">
            <text:p>Back 8 5 12</text:p>
          </table:table-cell>
          <table:table-cell table:style-name="ce4"/>
          <table:table-cell table:style-name="ce17" office:value-type="float" office:value="7" calcext:value-type="float">
            <text:p>7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4" calcext:value-type="float">
            <text:p>4</text:p>
          </table:table-cell>
          <table:table-cell table:formula="of:=[.M17]&amp;&quot; &quot;&amp;[.N17]&amp;&quot; &quot;&amp;[.O17]" office:value-type="string" office:string-value="7 13 4" calcext:value-type="string">
            <text:p>7 13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ack</text:p>
          </table:table-cell>
          <table:table-cell table:formula="of:=[.B6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A18]&amp;&quot; &quot;&amp;[.B18]&amp;&quot; &quot;&amp;[.C18]&amp;&quot; &quot;&amp;[.D18]" office:value-type="string" office:string-value="Back 11 5 25" calcext:value-type="string">
            <text:p>Back 11 5 25</text:p>
          </table:table-cell>
          <table:table-cell table:style-name="ce4"/>
          <table:table-cell table:style-name="ce9" table:formula="of:=[.A18]" office:value-type="string" office:string-value="Back" calcext:value-type="string">
            <text:p>Back</text:p>
          </table:table-cell>
          <table:table-cell table:style-name="ce17" table:formula="of:=[.B18]" office:value-type="float" office:value="11" calcext:value-type="float">
            <text:p>11</text:p>
          </table:table-cell>
          <table:table-cell table:style-name="ce17" table:formula="of:=[.C18]" office:value-type="float" office:value="5" calcext:value-type="float">
            <text:p>5</text:p>
          </table:table-cell>
          <table:table-cell table:style-name="ce17" office:value-type="float" office:value="12" calcext:value-type="float">
            <text:p>12</text:p>
          </table:table-cell>
          <table:table-cell table:style-name="ce19" table:formula="of:=[.G18]&amp;&quot; &quot;&amp;[.H18]&amp;&quot; &quot;&amp;[.I18]&amp;&quot; &quot;&amp;[.J18]" office:value-type="string" office:string-value="Back 11 5 12" calcext:value-type="string">
            <text:p>Back 11 5 12</text:p>
          </table:table-cell>
          <table:table-cell table:style-name="ce4"/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4" calcext:value-type="float">
            <text:p>4</text:p>
          </table:table-cell>
          <table:table-cell table:formula="of:=[.M18]&amp;&quot; &quot;&amp;[.N18]&amp;&quot; &quot;&amp;[.O18]" office:value-type="string" office:string-value="11 13 4" calcext:value-type="string">
            <text:p>11 13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ack</text:p>
          </table:table-cell>
          <table:table-cell table:formula="of:=[.B7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A19]&amp;&quot; &quot;&amp;[.B19]&amp;&quot; &quot;&amp;[.C19]&amp;&quot; &quot;&amp;[.D19]" office:value-type="string" office:string-value="Back 12 5 25" calcext:value-type="string">
            <text:p>Back 12 5 25</text:p>
          </table:table-cell>
          <table:table-cell table:style-name="ce4"/>
          <table:table-cell table:style-name="ce9" table:formula="of:=[.A19]" office:value-type="string" office:string-value="Back" calcext:value-type="string">
            <text:p>Back</text:p>
          </table:table-cell>
          <table:table-cell table:style-name="ce17" table:formula="of:=[.B19]" office:value-type="float" office:value="12" calcext:value-type="float">
            <text:p>12</text:p>
          </table:table-cell>
          <table:table-cell table:style-name="ce17" table:formula="of:=[.C19]" office:value-type="float" office:value="5" calcext:value-type="float">
            <text:p>5</text:p>
          </table:table-cell>
          <table:table-cell table:style-name="ce17" office:value-type="float" office:value="12" calcext:value-type="float">
            <text:p>12</text:p>
          </table:table-cell>
          <table:table-cell table:style-name="ce19" table:formula="of:=[.G19]&amp;&quot; &quot;&amp;[.H19]&amp;&quot; &quot;&amp;[.I19]&amp;&quot; &quot;&amp;[.J19]" office:value-type="string" office:string-value="Back 12 5 12" calcext:value-type="string">
            <text:p>Back 12 5 12</text:p>
          </table:table-cell>
          <table:table-cell table:style-name="ce4"/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4" calcext:value-type="float">
            <text:p>4</text:p>
          </table:table-cell>
          <table:table-cell table:formula="of:=[.M19]&amp;&quot; &quot;&amp;[.N19]&amp;&quot; &quot;&amp;[.O19]" office:value-type="string" office:string-value="16 13 4" calcext:value-type="string">
            <text:p>16 13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ack</text:p>
          </table:table-cell>
          <table:table-cell table:formula="of:=[.B8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A20]&amp;&quot; &quot;&amp;[.B20]&amp;&quot; &quot;&amp;[.C20]&amp;&quot; &quot;&amp;[.D20]" office:value-type="string" office:string-value="Back 15 5 25" calcext:value-type="string">
            <text:p>Back 15 5 25</text:p>
          </table:table-cell>
          <table:table-cell table:style-name="ce4"/>
          <table:table-cell table:style-name="ce9" table:formula="of:=[.A20]" office:value-type="string" office:string-value="Back" calcext:value-type="string">
            <text:p>Back</text:p>
          </table:table-cell>
          <table:table-cell table:style-name="ce17" table:formula="of:=[.B20]" office:value-type="float" office:value="15" calcext:value-type="float">
            <text:p>15</text:p>
          </table:table-cell>
          <table:table-cell table:style-name="ce17" table:formula="of:=[.C20]" office:value-type="float" office:value="5" calcext:value-type="float">
            <text:p>5</text:p>
          </table:table-cell>
          <table:table-cell table:style-name="ce17" office:value-type="float" office:value="12" calcext:value-type="float">
            <text:p>12</text:p>
          </table:table-cell>
          <table:table-cell table:style-name="ce19" table:formula="of:=[.G20]&amp;&quot; &quot;&amp;[.H20]&amp;&quot; &quot;&amp;[.I20]&amp;&quot; &quot;&amp;[.J20]" office:value-type="string" office:string-value="Back 15 5 12" calcext:value-type="string">
            <text:p>Back 15 5 12</text:p>
          </table:table-cell>
          <table:table-cell table:style-name="ce4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4" calcext:value-type="float">
            <text:p>4</text:p>
          </table:table-cell>
          <table:table-cell table:formula="of:=[.M20]&amp;&quot; &quot;&amp;[.N20]&amp;&quot; &quot;&amp;[.O20]" office:value-type="string" office:string-value="20 13 4" calcext:value-type="string">
            <text:p>20 13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ack</text:p>
          </table:table-cell>
          <table:table-cell table:formula="of:=[.B9]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A21]&amp;&quot; &quot;&amp;[.B21]&amp;&quot; &quot;&amp;[.C21]&amp;&quot; &quot;&amp;[.D21]" office:value-type="string" office:string-value="Back 16 5 25" calcext:value-type="string">
            <text:p>Back 16 5 25</text:p>
          </table:table-cell>
          <table:table-cell table:style-name="ce4"/>
          <table:table-cell table:style-name="ce9" table:formula="of:=[.A21]" office:value-type="string" office:string-value="Back" calcext:value-type="string">
            <text:p>Back</text:p>
          </table:table-cell>
          <table:table-cell table:style-name="ce17" table:formula="of:=[.B21]" office:value-type="float" office:value="16" calcext:value-type="float">
            <text:p>16</text:p>
          </table:table-cell>
          <table:table-cell table:style-name="ce17" table:formula="of:=[.C21]" office:value-type="float" office:value="5" calcext:value-type="float">
            <text:p>5</text:p>
          </table:table-cell>
          <table:table-cell table:style-name="ce17" office:value-type="float" office:value="12" calcext:value-type="float">
            <text:p>12</text:p>
          </table:table-cell>
          <table:table-cell table:style-name="ce19" table:formula="of:=[.G21]&amp;&quot; &quot;&amp;[.H21]&amp;&quot; &quot;&amp;[.I21]&amp;&quot; &quot;&amp;[.J21]" office:value-type="string" office:string-value="Back 16 5 12" calcext:value-type="string">
            <text:p>Back 16 5 12</text:p>
          </table:table-cell>
          <table:table-cell table:style-name="ce4"/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4" calcext:value-type="float">
            <text:p>4</text:p>
          </table:table-cell>
          <table:table-cell table:formula="of:=[.M21]&amp;&quot; &quot;&amp;[.N21]&amp;&quot; &quot;&amp;[.O21]" office:value-type="string" office:string-value="24 13 4" calcext:value-type="string">
            <text:p>24 13 4</text:p>
          </table:table-cell>
          <table:table-cell table:number-columns-repeated="13"/>
          <table:table-cell table:style-name="ce6" table:number-columns-repeated="16355"/>
        </table:table-row>
        <table:table-row table:style-name="ro1">
          <table:table-cell office:value-type="string" calcext:value-type="string">
            <text:p>Back</text:p>
          </table:table-cell>
          <table:table-cell table:formula="of:=[.B10]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A22]&amp;&quot; &quot;&amp;[.B22]&amp;&quot; &quot;&amp;[.C22]&amp;&quot; &quot;&amp;[.D22]" office:value-type="string" office:string-value="Back 19 5 25" calcext:value-type="string">
            <text:p>Back 19 5 25</text:p>
          </table:table-cell>
          <table:table-cell table:style-name="ce4"/>
          <table:table-cell table:style-name="ce9" table:formula="of:=[.A22]" office:value-type="string" office:string-value="Back" calcext:value-type="string">
            <text:p>Back</text:p>
          </table:table-cell>
          <table:table-cell table:style-name="ce17" table:formula="of:=[.B22]" office:value-type="float" office:value="19" calcext:value-type="float">
            <text:p>19</text:p>
          </table:table-cell>
          <table:table-cell table:style-name="ce17" table:formula="of:=[.C22]" office:value-type="float" office:value="5" calcext:value-type="float">
            <text:p>5</text:p>
          </table:table-cell>
          <table:table-cell table:style-name="ce17" office:value-type="float" office:value="12" calcext:value-type="float">
            <text:p>12</text:p>
          </table:table-cell>
          <table:table-cell table:style-name="ce19" table:formula="of:=[.G22]&amp;&quot; &quot;&amp;[.H22]&amp;&quot; &quot;&amp;[.I22]&amp;&quot; &quot;&amp;[.J22]" office:value-type="string" office:string-value="Back 19 5 12" calcext:value-type="string">
            <text:p>Back 19 5 12</text:p>
          </table:table-cell>
          <table:table-cell table:style-name="ce4"/>
          <table:table-cell table:number-columns-repeated="17"/>
          <table:table-cell table:style-name="ce6" table:number-columns-repeated="16355"/>
        </table:table-row>
        <table:table-row table:style-name="ro1">
          <table:table-cell office:value-type="string" calcext:value-type="string">
            <text:p>Back</text:p>
          </table:table-cell>
          <table:table-cell table:formula="of:=[.B11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A23]&amp;&quot; &quot;&amp;[.B23]&amp;&quot; &quot;&amp;[.C23]&amp;&quot; &quot;&amp;[.D23]" office:value-type="string" office:string-value="Back 20 5 25" calcext:value-type="string">
            <text:p>Back 20 5 25</text:p>
          </table:table-cell>
          <table:table-cell table:style-name="ce4"/>
          <table:table-cell table:style-name="ce9" table:formula="of:=[.A23]" office:value-type="string" office:string-value="Back" calcext:value-type="string">
            <text:p>Back</text:p>
          </table:table-cell>
          <table:table-cell table:style-name="ce17" table:formula="of:=[.B23]" office:value-type="float" office:value="20" calcext:value-type="float">
            <text:p>20</text:p>
          </table:table-cell>
          <table:table-cell table:style-name="ce17" table:formula="of:=[.C23]" office:value-type="float" office:value="5" calcext:value-type="float">
            <text:p>5</text:p>
          </table:table-cell>
          <table:table-cell table:style-name="ce17" office:value-type="float" office:value="54" calcext:value-type="float">
            <text:p>54</text:p>
          </table:table-cell>
          <table:table-cell table:style-name="ce19" table:formula="of:=[.G23]&amp;&quot; &quot;&amp;[.H23]&amp;&quot; &quot;&amp;[.I23]&amp;&quot; &quot;&amp;[.J23]" office:value-type="string" office:string-value="Back 20 5 54" calcext:value-type="string">
            <text:p>Back 20 5 54</text:p>
          </table:table-cell>
          <table:table-cell table:style-name="ce4"/>
          <table:table-cell table:number-columns-repeated="17"/>
          <table:table-cell table:style-name="ce6" table:number-columns-repeated="16355"/>
        </table:table-row>
        <table:table-row table:style-name="ro1">
          <table:table-cell office:value-type="string" calcext:value-type="string">
            <text:p>Back</text:p>
          </table:table-cell>
          <table:table-cell table:formula="of:=[.B12]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A24]&amp;&quot; &quot;&amp;[.B24]&amp;&quot; &quot;&amp;[.C24]&amp;&quot; &quot;&amp;[.D24]" office:value-type="string" office:string-value="Back 23 5 25" calcext:value-type="string">
            <text:p>Back 23 5 25</text:p>
          </table:table-cell>
          <table:table-cell table:style-name="ce4"/>
          <table:table-cell table:style-name="ce9" table:formula="of:=[.A24]" office:value-type="string" office:string-value="Back" calcext:value-type="string">
            <text:p>Back</text:p>
          </table:table-cell>
          <table:table-cell table:style-name="ce17" table:formula="of:=[.B24]" office:value-type="float" office:value="23" calcext:value-type="float">
            <text:p>23</text:p>
          </table:table-cell>
          <table:table-cell table:style-name="ce17" table:formula="of:=[.C24]" office:value-type="float" office:value="5" calcext:value-type="float">
            <text:p>5</text:p>
          </table:table-cell>
          <table:table-cell table:style-name="ce17" office:value-type="float" office:value="12" calcext:value-type="float">
            <text:p>12</text:p>
          </table:table-cell>
          <table:table-cell table:style-name="ce19" table:formula="of:=[.G24]&amp;&quot; &quot;&amp;[.H24]&amp;&quot; &quot;&amp;[.I24]&amp;&quot; &quot;&amp;[.J24]" office:value-type="string" office:string-value="Back 23 5 12" calcext:value-type="string">
            <text:p>Back 23 5 12</text:p>
          </table:table-cell>
          <table:table-cell table:style-name="ce4"/>
          <table:table-cell table:number-columns-repeated="17"/>
          <table:table-cell table:style-name="ce6" table:number-columns-repeated="16355"/>
        </table:table-row>
        <table:table-row table:style-name="ro1">
          <table:table-cell office:value-type="string" calcext:value-type="string">
            <text:p>Back</text:p>
          </table:table-cell>
          <table:table-cell table:formula="of:=[.B13]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A25]&amp;&quot; &quot;&amp;[.B25]&amp;&quot; &quot;&amp;[.C25]&amp;&quot; &quot;&amp;[.D25]" office:value-type="string" office:string-value="Back 24 5 25" calcext:value-type="string">
            <text:p>Back 24 5 25</text:p>
          </table:table-cell>
          <table:table-cell table:style-name="ce4"/>
          <table:table-cell table:style-name="ce9" table:formula="of:=[.A25]" office:value-type="string" office:string-value="Back" calcext:value-type="string">
            <text:p>Back</text:p>
          </table:table-cell>
          <table:table-cell table:style-name="ce17" table:formula="of:=[.B25]" office:value-type="float" office:value="24" calcext:value-type="float">
            <text:p>24</text:p>
          </table:table-cell>
          <table:table-cell table:style-name="ce17" table:formula="of:=[.C25]" office:value-type="float" office:value="5" calcext:value-type="float">
            <text:p>5</text:p>
          </table:table-cell>
          <table:table-cell table:style-name="ce17" office:value-type="float" office:value="12" calcext:value-type="float">
            <text:p>12</text:p>
          </table:table-cell>
          <table:table-cell table:style-name="ce19" table:formula="of:=[.G25]&amp;&quot; &quot;&amp;[.H25]&amp;&quot; &quot;&amp;[.I25]&amp;&quot; &quot;&amp;[.J25]" office:value-type="string" office:string-value="Back 24 5 12" calcext:value-type="string">
            <text:p>Back 24 5 12</text:p>
          </table:table-cell>
          <table:table-cell table:style-name="ce4"/>
          <table:table-cell table:number-columns-repeated="17"/>
          <table:table-cell table:style-name="ce6" table:number-columns-repeated="16355"/>
        </table:table-row>
        <table:table-row table:style-name="ro2">
          <table:table-cell table:number-columns-repeated="4"/>
          <table:table-cell table:style-name="ce11" table:formula="of:=COM.MICROSOFT.TEXTJOIN(&quot; &quot;; 1; [.E2:.E25])" office:value-type="string" office:string-value="Buildings 3 1 24 Buildings 4 1 24 Buildings 7 1 24 Buildings 8 1 24 Buildings 11 1 24 Buildings 12 1 24 Buildings 15 1 24 Buildings 16 1 24 Buildings 19 1 24 Buildings 20 1 24 Buildings 23 1 24 Buildings 24 1 24 Back 3 5 25 Back 4 5 25 Back 7 5 25 Back 8 5 25 Back 11 5 25 Back 12 5 25 Back 15 5 25 Back 16 5 25 Back 19 5 25 Back 20 5 25 Back 23 5 25 Back 24 5 25" calcext:value-type="string">
            <text:p>Buildings 3 1 24 Buildings 4 1 24 Buildings 7 1 24 Buildings 8 1 24 Buildings 11 1 24 Buildings 12 1 24 Buildings 15 1 24 Buildings 16 1 24 Buildings 19 1 24 Buildings 20 1 24 Buildings 23 1 24 Buildings 24 1 24 Back 3 5 25 Back 4 5 25 Back 7 5 25 Back 8 5 25 Back 11 5 25 Back 12 5 25 Back 15 5 25 Back 16 5 25 Back 19 5 25 Back 20 5 25 Back 23 5 25 Back 24 5 25</text:p>
          </table:table-cell>
          <table:table-cell table:style-name="ce10"/>
          <table:table-cell table:style-name="ce12"/>
          <table:table-cell table:style-name="ce13" table:number-columns-repeated="3"/>
          <table:table-cell table:style-name="ce26" table:formula="of:=COM.MICROSOFT.TEXTJOIN(&quot; &quot;; 1; [.K2:.K25])" office:value-type="string" office:string-value="Buildings 3 1 26 Buildings 4 1 26 Buildings 7 1 26 Buildings 8 1 26 Buildings 11 1 26 Buildings 12 1 26 Buildings 15 1 26 Buildings 16 1 26 Buildings 19 1 26 Buildings 20 1 26 Buildings 23 1 26 Buildings 24 1 26 Back 3 5 12 Back 4 5 12 Back 7 5 12 Back 8 5 12 Back 11 5 12 Back 12 5 12 Back 15 5 12 Back 16 5 12 Back 19 5 12 Back 20 5 54 Back 23 5 12 Back 24 5 12" calcext:value-type="string">
            <text:p>Buildings 3 1 26 Buildings 4 1 26 Buildings 7 1 26 Buildings 8 1 26 Buildings 11 1 26 Buildings 12 1 26 Buildings 15 1 26 Buildings 16 1 26 Buildings 19 1 26 Buildings 20 1 26 Buildings 23 1 26 Buildings 24 1 26 Back 3 5 12 Back 4 5 12 Back 7 5 12 Back 8 5 12 Back 11 5 12 Back 12 5 12 Back 15 5 12 Back 16 5 12 Back 19 5 12 Back 20 5 54 Back 23 5 12 Back 24 5 12</text:p>
          </table:table-cell>
          <table:table-cell table:style-name="ce10"/>
          <table:table-cell table:number-columns-repeated="3"/>
          <table:table-cell table:style-name="ce30" table:formula="of:=COM.MICROSOFT.TEXTJOIN(&quot; &quot;; 1; [.P2:.P21])" office:value-type="string" office:string-value="3 5 4 4 5 4 7 5 4 8 5 4 11 5 4 12 5 4 15 5 4 16 5 4 19 5 4 20 5 4 23 5 4 24 5 4 11 9 4 16 9 4 3 13 4 7 13 4 11 13 4 16 13 4 20 13 4 24 13 4" calcext:value-type="string">
            <text:p>3 5 4 4 5 4 7 5 4 8 5 4 11 5 4 12 5 4 15 5 4 16 5 4 19 5 4 20 5 4 23 5 4 24 5 4 11 9 4 16 9 4 3 13 4 7 13 4 11 13 4 16 13 4 20 13 4 24 13 4</text:p>
          </table:table-cell>
          <table:table-cell table:number-columns-repeated="13"/>
          <table:table-cell table:style-name="ce6" table:number-columns-repeated="16355"/>
        </table:table-row>
        <table:table-row table:style-name="ro1" table:number-rows-repeated="7">
          <table:table-cell table:number-columns-repeated="5"/>
          <table:table-cell table:style-name="ce10"/>
          <table:table-cell table:style-name="ce12"/>
          <table:table-cell table:style-name="ce13" table:number-columns-repeated="3"/>
          <table:table-cell table:style-name="ce23"/>
          <table:table-cell table:style-name="ce10"/>
          <table:table-cell table:number-columns-repeated="17"/>
          <table:table-cell table:style-name="ce6" table:number-columns-repeated="16355"/>
        </table:table-row>
        <table:table-row table:style-name="ro1" table:number-rows-repeated="12">
          <table:table-cell table:style-name="Default" table:number-columns-repeated="4"/>
          <table:table-cell table:style-name="ce19"/>
          <table:table-cell table:style-name="ce10"/>
          <table:table-cell table:style-name="ce12"/>
          <table:table-cell table:style-name="ce13" table:number-columns-repeated="3"/>
          <table:table-cell table:style-name="ce23"/>
          <table:table-cell table:style-name="ce10"/>
          <table:table-cell table:number-columns-repeated="17"/>
          <table:table-cell table:style-name="ce6" table:number-columns-repeated="16355"/>
        </table:table-row>
        <table:table-row table:style-name="ro1" table:number-rows-repeated="44">
          <table:table-cell table:number-columns-repeated="5"/>
          <table:table-cell table:style-name="ce10"/>
          <table:table-cell table:style-name="ce12"/>
          <table:table-cell table:style-name="ce13" table:number-columns-repeated="3"/>
          <table:table-cell table:style-name="ce23"/>
          <table:table-cell table:style-name="ce10"/>
          <table:table-cell table:number-columns-repeated="17"/>
          <table:table-cell table:style-name="ce6" table:number-columns-repeated="16355"/>
        </table:table-row>
        <table:table-row table:style-name="ro1" table:number-rows-repeated="2">
          <table:table-cell table:number-columns-repeated="5"/>
          <table:table-cell table:style-name="ce10"/>
          <table:table-cell table:style-name="ce12"/>
          <table:table-cell table:style-name="ce13" table:number-columns-repeated="3"/>
          <table:table-cell table:style-name="ce23"/>
          <table:table-cell table:style-name="ce10"/>
          <table:table-cell table:style-name="Default" table:number-columns-repeated="3"/>
          <table:table-cell table:number-columns-repeated="14"/>
          <table:table-cell table:style-name="ce6" table:number-columns-repeated="16355"/>
        </table:table-row>
        <table:table-row table:style-name="ro1" table:number-rows-repeated="11">
          <table:table-cell table:number-columns-repeated="5"/>
          <table:table-cell table:style-name="ce10"/>
          <table:table-cell table:style-name="ce12"/>
          <table:table-cell table:style-name="ce13" table:number-columns-repeated="2"/>
          <table:table-cell table:style-name="ce10"/>
          <table:table-cell table:style-name="ce24"/>
          <table:table-cell table:style-name="ce10"/>
          <table:table-cell table:style-name="Default" table:number-columns-repeated="3"/>
          <table:table-cell table:number-columns-repeated="14"/>
          <table:table-cell table:style-name="ce6" table:number-columns-repeated="16355"/>
        </table:table-row>
        <table:table-row table:style-name="ro1" table:number-rows-repeated="21">
          <table:table-cell table:number-columns-repeated="5"/>
          <table:table-cell table:style-name="ce10"/>
          <table:table-cell table:style-name="ce12"/>
          <table:table-cell table:style-name="ce13" table:number-columns-repeated="2"/>
          <table:table-cell table:style-name="ce10"/>
          <table:table-cell table:style-name="ce24"/>
          <table:table-cell table:style-name="ce10"/>
          <table:table-cell table:number-columns-repeated="17"/>
          <table:table-cell table:style-name="ce6" table:number-columns-repeated="16355"/>
        </table:table-row>
        <table:table-row table:style-name="ro1" table:number-rows-repeated="22">
          <table:table-cell table:number-columns-repeated="11"/>
          <table:table-cell table:style-name="ce10"/>
          <table:table-cell table:number-columns-repeated="17"/>
          <table:table-cell table:style-name="ce6" table:number-columns-repeated="16355"/>
        </table:table-row>
        <table:table-row table:style-name="ro1" table:number-rows-repeated="1048430">
          <table:table-cell table:number-columns-repeated="29"/>
          <table:table-cell table:style-name="ce6" table:number-columns-repeated="16355"/>
        </table:table-row>
        <table:table-row table:style-name="ro1">
          <table:table-cell table:number-columns-repeated="29"/>
          <table:table-cell table:style-name="ce6" table:number-columns-repeated="163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Light" svg:font-family="'Roboto Light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12:36:46.7014479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4T09:54:49.490473181</meta:creation-date>
    <dc:date>2026-05-15T12:38:46.779557670</dc:date>
    <meta:editing-duration>PT57M48S</meta:editing-duration>
    <meta:editing-cycles>19</meta:editing-cycles>
    <meta:generator>LibreOffice/26.2.3.2$Linux_X86_64 LibreOffice_project/620$Build-2</meta:generator>
    <meta:document-statistic meta:table-count="1" meta:cell-count="326" meta:object-count="0"/>
  </office:meta>
</office:document-meta>
</file>